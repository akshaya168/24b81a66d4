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What is Git?</text:h>
      <text:p text:style-name="Text_20_body"><text:span text:style-name="T1">Git</text:span> is a <text:span text:style-name="T1">Distributed Version Control System (DVCS)</text:span>. Unlike older systems where the history was stored on a single central server, Git gives every developer a full copy of the entire project history on their local machine.</text:p>
      <text:list xml:id="list857178228" text:style-name="L1">
        <text:list-item>
          <text:p text:style-name="P1"><text:span text:style-name="T1">Performance:</text:span> Most operations are local, making Git incredibly fast.</text:p>
        </text:list-item>
        <text:list-item>
          <text:p text:style-name="P1"><text:span text:style-name="T1">Flexibility:</text:span> It supports non-linear development through powerful branching featur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0:41:16.761913827</meta:creation-date>
    <dc:date>2026-03-17T10:42:34.529420996</dc:date>
    <meta:editing-duration>PT1M18S</meta:editing-duration>
    <meta:editing-cycles>1</meta:editing-cycles>
    <meta:document-statistic meta:table-count="0" meta:image-count="0" meta:object-count="0" meta:page-count="1" meta:paragraph-count="4" meta:word-count="60" meta:character-count="386" meta:non-whitespace-character-count="332"/>
    <meta:generator>LibreOffice/7.3.7.2$Linux_X86_64 LibreOffice_project/30$Build-2</meta:generator>
  </office:meta>
</office:document-meta>
</file>