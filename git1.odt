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VgNMqogKMhedKmXD9fuzzxkhQhWdCV1WZdcq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7T11:06:40.340815227</meta:creation-date>
    <dc:date>2026-03-17T11:22:34.897332932</dc:date>
    <meta:editing-duration>PT5M44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3.7.2$Linux_X86_64 LibreOffice_project/30$Build-2</meta:generator>
  </office:meta>
</office:document-meta>
</file>